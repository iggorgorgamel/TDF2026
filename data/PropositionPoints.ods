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llot ver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ilot à pois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21*3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ant derni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 5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5+4+3+2+1" office:value-type="float" office:value="15" calcext:value-type="float">
            <text:p>15</text:p>
          </table:table-cell>
          <table:table-cell table:formula="of:=5*3.3" office:value-type="float" office:value="16.5" calcext:value-type="float">
            <text:p>16.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E8]/[.F8]" office:value-type="float" office:value="3.33333333333333" calcext:value-type="float">
            <text:p>3.33333333333333</text:p>
          </table:table-cell>
          <table:table-cell table:formula="of:=4*3.3" office:value-type="float" office:value="13.2" calcext:value-type="float">
            <text:p>13.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3*3.3" office:value-type="float" office:value="9.9" calcext:value-type="float">
            <text:p>9.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table:formula="of:=[.J7]-[.J11]" office:value-type="float" office:value="70" calcext:value-type="float">
            <text:p>70</text:p>
          </table:table-cell>
          <table:table-cell table:formula="of:=[.L11]/10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G8:.G12])" office:value-type="float" office:value="49.5" calcext:value-type="float">
            <text:p>49.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illeur Belg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per combatif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D20]*[.C20]" office:value-type="float" office:value="945" calcext:value-type="float">
            <text:p>94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1T19:08:16.009000000</meta:creation-date>
    <dc:date>2023-07-01T19:26:16.127000000</dc:date>
    <meta:editing-duration>PT7M19S</meta:editing-duration>
    <meta:editing-cycles>3</meta:editing-cycles>
    <meta:generator>LibreOffice/7.3.4.2$Windows_X86_64 LibreOffice_project/728fec16bd5f605073805c3c9e7c4212a0120dc5</meta:generator>
    <meta:document-statistic meta:table-count="1" meta:cell-count="45" meta:object-count="0"/>
  </office:meta>
</office:document-meta>
</file>